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Atari800&quot;" svg:font-family="&quot;Atari800&quot;" style:font-pitch="fixed"/>
    <style:font-face style:name="C-64" svg:font-family="C-64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751cm" fo:min-width="5.313cm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751cm" fo:min-width="6.398cm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0.751cm" fo:min-width="6.398cm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  <style:text-properties style:font-name="FreeMono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ff0000"/>
      <style:paragraph-properties fo:text-align="center"/>
      <style:text-properties style:font-name="FreeMon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00a933"/>
      <style:paragraph-properties fo:text-align="center"/>
      <style:text-properties style:font-name="FreeMono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FreeMon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cm" svg:height="1cm" svg:x="6.08cm" svg:y="3.857cm">
          <text:p text:style-name="P1"><text:span text:style-name="T1">X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7.5cm" svg:height="1cm" svg:x="6.08cm" svg:y="8.327cm">
          <text:p text:style-name="P1"><text:span text:style-name="T1">X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7.5cm" svg:height="1cm" svg:x="6.08cm" svg:y="9.817cm">
          <text:p text:style-name="P1"><text:span text:style-name="T1">Y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7.5cm" svg:height="1cm" svg:x="6.08cm" svg:y="14.287cm">
          <text:p text:style-name="P1"><text:span text:style-name="T1">Y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7.5cm" svg:height="1cm" svg:x="6.08cm" svg:y="6.837cm">
          <text:p text:style-name="P1"><text:span text:style-name="T1">X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7.5cm" svg:height="1cm" svg:x="6.08cm" svg:y="5.347cm">
          <text:p text:style-name="P1"><text:span text:style-name="T1">X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7.5cm" svg:height="1cm" svg:x="6.08cm" svg:y="12.797cm">
          <text:p text:style-name="P1"><text:span text:style-name="T1">Y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7.5cm" svg:height="1cm" svg:x="6.08cm" svg:y="11.307cm">
          <text:p text:style-name="P1"><text:span text:style-name="T1">Y</text:span></text:p>
          <draw:enhanced-geometry svg:viewBox="0 0 21600 21600" draw:text-areas="0 ?f0 ?f5 ?f2" draw:type="right-arrow" draw:modifiers="19863.591521130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Atari800&quot;" svg:font-family="&quot;Atari800&quot;" style:font-pitch="fixed"/>
    <style:font-face style:name="C-64" svg:font-family="C-64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ter Vanderelst</meta:initial-creator>
    <meta:creation-date>2025-11-14T08:24:33.975791757</meta:creation-date>
    <dc:date>2025-11-14T08:30:38.109346325</dc:date>
    <dc:creator>Dieter Vanderelst</dc:creator>
    <meta:editing-duration>PT6M5S</meta:editing-duration>
    <meta:editing-cycles>1</meta:editing-cycles>
    <meta:document-statistic meta:object-count="8"/>
    <meta:generator>LibreOffice/24.2.7.2$Linux_X86_64 LibreOffice_project/420$Build-2</meta:generator>
  </office:meta>
</office:document-meta>
</file>